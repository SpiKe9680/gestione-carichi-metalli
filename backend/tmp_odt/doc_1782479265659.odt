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100000377E40366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9.631cm" style:rel-column-width="37099*"/>
    </style:style>
    <style:style style:name="Tabella2.B" style:family="table-column">
      <style:table-column-properties style:column-width="3.942cm" style:rel-column-width="15186*"/>
    </style:style>
    <style:style style:name="Tabella2.C" style:family="table-column">
      <style:table-column-properties style:column-width="3.44cm" style:rel-column-width="1325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02cm solid #000000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5.292cm" style:rel-column-width="20384*"/>
    </style:style>
    <style:style style:name="Tabella3.B" style:family="table-column">
      <style:table-column-properties style:column-width="4.128cm" style:rel-column-width="15899*"/>
    </style:style>
    <style:style style:name="Tabella3.C" style:family="table-column">
      <style:table-column-properties style:column-width="3.836cm" style:rel-column-width="14778*"/>
    </style:style>
    <style:style style:name="Tabella3.D" style:family="table-column">
      <style:table-column-properties style:column-width="3.757cm" style:rel-column-width="14474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1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text-properties style:font-name="Calibri1"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text-properties style:font-name="Calibri1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alibri1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Calibri1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variant="normal" fo:text-transform="none" fo:color="#222222" style:font-name="Calibri1" fo:font-size="7pt" fo:letter-spacing="normal" fo:font-style="normal" fo:font-weight="normal" style:font-size-asian="7pt" style:font-size-complex="7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ext_20_body">
      <style:text-properties style:font-name="Calibri" fo:font-size="8pt"/>
    </style:style>
    <style:style style:name="P15" style:family="paragraph" style:parent-style-name="Text_20_body">
      <style:text-properties style:font-name="Ca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text-properties fo:font-size="8pt" style:font-size-asian="8pt" style:font-size-complex="8pt"/>
    </style:style>
    <style:style style:name="P17" style:family="paragraph" style:parent-style-name="Text_20_body">
      <style:text-properties style:font-name="Calibri" fo:font-size="8pt"/>
    </style:style>
    <style:style style:name="P18" style:family="paragraph" style:parent-style-name="Text_20_body">
      <style:text-properties style:font-name="Calibri" fo:font-size="8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8pt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as-char" svg:width="3.96cm" svg:height="3.244cm" draw:z-index="0"><draw:image xlink:href="Pictures/100000000000048100000377E4036694.png" xlink:type="simple" xlink:show="embed" xlink:actuate="onLoad"/></draw:frame></text:p>
      <text:p text:style-name="P3">TAMMARO METALLI SRL</text:p>
      <text:p text:style-name="P3">VIALE AGRIGENTO, 1 </text:p>
      <text:p text:style-name="P3">80025 CASANDRINO (NA)</text:p>
      <text:p text:style-name="P3">P.IVA/C.F. : 10097291214</text:p>
      <text:p text:style-name="P1"/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MITTENTE:</text:p>
            <text:p text:style-name="P4"/>
            <text:p text:style-name="P16">#@#NOMEMITTENTE#@#</text:p>
            <text:p text:style-name="P16">#@#INDIRIZZOMITTENTE#@#</text:p>
            <text:p text:style-name="P16">#@#CITTAMITTENTE#@#</text:p>
            <text:p text:style-name="P16">P.IVA/C.F. : #@#CODICEFISCALEPIVAMITTENTE#@# </text:p>
          </table:table-cell>
          <table:table-cell table:style-name="Tabella1.B1" office:value-type="string">
            <text:p text:style-name="P7"><text:span text:style-name="T1">DOCUMENTO DI TRASPO</text:span>RTO (D.D.T.)</text:p>
            <text:p text:style-name="P8">D.P.R. 472 DEL 14/08/1986 – D.P.DR. 696 DEL 21-12-1996</text:p>
            <text:p text:style-name="P16">#@#NR_E_DATA#@#</text:p>
            <text:p text:style-name="P7"/>
            <text:p text:style-name="P7">A MEZZO: <text:s/>CEDENTE <text:s/>_____ CESSIONARIO _____ <text:s text:c="2"/></text:p>
            <text:p text:style-name="P7"><text:s text:c="5"/></text:p>
            <text:p text:style-name="Table_20_Contents">CASUALE TRASPORTO: VENDITA <text:s text:c="3"/></text:p>
          </table:table-cell>
        </table:table-row>
        <table:table-row>
          <table:table-cell table:style-name="Tabella1.A2" office:value-type="string">
            <text:p text:style-name="P6">CESSIONARIO, DITTA. DOMICILIO:</text:p>
            <text:p text:style-name="P6"/>
            <text:p text:style-name="P15">#@#NOMECESSIONARIO#@#</text:p>
            <text:p text:style-name="P14">#@#INDIRIZZOCESSIONARIO#@#</text:p>
            <text:p text:style-name="P14">P.IVA/CF #@#PIVACF_CESSIONARIO#@#</text:p>
          </table:table-cell>
          <table:table-cell table:style-name="Tabella1.B2" office:value-type="string">
            <text:p text:style-name="P6">LUOGO DI DESTINAZIONE:</text:p>
            <text:p text:style-name="P18"/>
            <text:p text:style-name="P16">#@#NOMEDESTINAZIONE#@#</text:p>
            <text:p text:style-name="P16">#@#INDIRIZZO_DESTINAZIONE#@#</text:p>
            <text:p text:style-name="Text_20_body"><text:span text:style-name="T2">P.IVA /CF</text:span><text:span text:style-name="T3"> #@#PIVACF_DESTINAZIONE#@# </text:span></text:p>
          </table:table-cell>
        </table:table-row>
      </table:table>
      <text:p text:style-name="P1"/>
      <text:p text:style-name="P1"/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1">DESCRIZIONE DEI BENI (Natura e Qualità</text:p>
          </table:table-cell>
          <table:table-cell table:style-name="Tabella2.A1" office:value-type="string">
            <text:p text:style-name="P5">UNITA' DI MISURA</text:p>
          </table:table-cell>
          <table:table-cell table:style-name="Tabella2.C1" office:value-type="string">
            <text:p text:style-name="P5">QUANTITA</text:p>
          </table:table-cell>
        </table:table-row>
        <table:table-row>
          <table:table-cell table:style-name="Tabella2.A2" office:value-type="string">
            <text:p text:style-name="P9">ROTTAMI DI ALLUMINIO </text:p>
          </table:table-cell>
          <table:table-cell table:style-name="Tabella2.A2" office:value-type="string">
            <text:p text:style-name="P10">Kg.</text:p>
          </table:table-cell>
          <table:table-cell table:style-name="Tabella2.C2" office:value-type="string">
            <text:p text:style-name="P13">#@#QUANTITABENI#@# </text:p>
          </table:table-cell>
        </table:table-row>
        <table:table-row>
          <table:table-cell table:style-name="Tabella2.A2" office:value-type="string">
            <text:p text:style-name="P12">TRATTASI DI M.P.S. (MATERIA PRIMA E SECONDARIA) ESCLUSE DAL CAMPO DI APPLICAZIONI D. Lgs N°22/97 AI SENSI DEL DM 05/02/98</text:p>
          </table:table-cell>
          <table:table-cell table:style-name="Tabella2.A2" office:value-type="string">
            <text:p text:style-name="P10"/>
          </table:table-cell>
          <table:table-cell table:style-name="Tabella2.C3">
            <text:p text:style-name="P10"/>
          </table:table-cell>
        </table:table-row>
        <table:table-row>
          <table:table-cell table:style-name="Tabella2.A2" office:value-type="string">
            <text:p text:style-name="P6">ROTTAMI NON FERROSI EOW AI SENSI DEL D.LGS 152/2006 (COME MODIFICATO AL D.L.GS205/10) ART.184-TER CONFORME ALLE SPECIFICHE DEL RE. 333/2011)</text:p>
          </table:table-cell>
          <table:table-cell table:style-name="Tabella2.A2" office:value-type="string">
            <text:p text:style-name="P9"/>
          </table:table-cell>
          <table:table-cell table:style-name="Tabella2.C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9">PESO DA VERIFICARSI A DESTINO</text:p>
          </table:table-cell>
          <table:table-cell table:style-name="Tabella2.A2" office:value-type="string">
            <text:p text:style-name="P10">Kg.</text:p>
          </table:table-cell>
          <table:table-cell table:style-name="Tabella2.C3">
            <text:p text:style-name="P10"/>
          </table:table-cell>
        </table:table-row>
        <table:table-row>
          <table:table-cell table:style-name="Tabella2.A2" office:value-type="string">
            <text:p text:style-name="P11">PESO RISCONTRATO KG.:</text:p>
          </table:table-cell>
          <table:table-cell table:style-name="Tabella2.A2" office:value-type="string">
            <text:p text:style-name="P9"/>
          </table:table-cell>
          <table:table-cell table:style-name="Tabella2.C2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9"/>
          </table:table-cell>
        </table:table-row>
      </table:table>
      <text:p text:style-name="P1"/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4">VETTORE: DITTA, DOM. O RESIDENZA</text:p>
          </table:table-cell>
          <table:table-cell table:style-name="Tabella3.A1" office:value-type="string">
            <text:p text:style-name="P4">COLLI: <text:s text:c="48"/></text:p>
          </table:table-cell>
          <table:table-cell table:style-name="Tabella3.A1" office:value-type="string">
            <text:p text:style-name="P9"><text:s/><text:span text:style-name="T1">QUANTITA':</text:span></text:p>
          </table:table-cell>
          <table:table-cell table:style-name="Tabella3.D1" office:value-type="string">
            <text:p text:style-name="P4">PORTO:</text:p>
          </table:table-cell>
        </table:table-row>
        <table:table-row>
          <table:table-cell table:style-name="Tabella3.A2" office:value-type="string">
            <text:p text:style-name="P13">#@#NOMEVETTORE#@# </text:p>
          </table:table-cell>
          <table:table-cell table:style-name="Tabella3.A2" office:value-type="string">
            <text:p text:style-name="P13">#@#NCOLLI#@# </text:p>
          </table:table-cell>
          <table:table-cell table:style-name="Tabella3.A2" office:value-type="string">
            <text:p text:style-name="P13">KG. <text:s/></text:p>
            <text:p text:style-name="P13">#@#QUANTITA#@# </text:p>
          </table:table-cell>
          <table:table-cell table:style-name="Tabella3.D2" office:value-type="string">
            <text:p text:style-name="P16">#@#PORTO#@#</text:p>
          </table:table-cell>
        </table:table-row>
        <table:table-row>
          <table:table-cell table:style-name="Tabella3.A2" office:value-type="string">
            <text:p text:style-name="P4">NOME E COGNOME DEL CONDUCENTE :</text:p>
            <text:p text:style-name="P13">#@#CONDUCENTE#@# </text:p>
          </table:table-cell>
          <table:table-cell table:style-name="Tabella3.A2" office:value-type="string">
            <text:p text:style-name="P4">TARGA AUTOM.</text:p>
            <text:p text:style-name="P13">#@#TARGAAUTOMEZZO#@# </text:p>
          </table:table-cell>
          <table:table-cell table:style-name="Tabella3.A2" office:value-type="string">
            <text:p text:style-name="P4">FIRMA CONDUCENTE</text:p>
          </table:table-cell>
          <table:table-cell table:style-name="Tabella3.D2" office:value-type="string">
            <text:p text:style-name="P4">FIRMA DESTINATARIO</text:p>
          </table:table-cell>
        </table:table-row>
      </table:table>
      <text:p text:style-name="P2">Consegna o inizio trasporto a mezzo cedente <text:s text:c="14"/>cessionario</text:p>
      <text:p text:style-name="P2"/>
      <text:p text:style-name="P2"/>
      <text:p text:style-name="P2">Ai senti del D.Lgs 196/2003 Vi informiamo che i Vs. dati saranno utilizzati esclusivamente per fini connessi <text:s/>ai rapporti commerciali tra di noi in essere.</text:p>
      <text:p text:style-name="P2">Vi preghiamo di controllare i Vs. dati anagrafici, la P. IVA e il Codice Fiscale . Non ci riteniamo responsabili di eventuali erro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23T08:17:23.54</meta:creation-date>
    <dc:date>2026-06-26T12:55:22.27</dc:date>
    <meta:editing-duration>P1DT13H27M23S</meta:editing-duration>
    <meta:editing-cycles>66</meta:editing-cycles>
    <meta:generator>OpenOffice/4.1.15$Win32 OpenOffice.org_project/4115m2$Build-9813</meta:generator>
    <meta:print-date>2026-01-14T11:17:49.43</meta:print-date>
    <dc:creator>Tammaro Metalli </dc:creator>
    <meta:printed-by>Tammaro Metalli </meta:printed-by>
    <meta:document-statistic meta:table-count="4" meta:image-count="1" meta:object-count="0" meta:page-count="1" meta:paragraph-count="53" meta:word-count="204" meta:character-count="1653"/>
  </office:meta>
</office:document-meta>
</file>